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2.0pt" fo:color="#000000"/>
    </style:style>
    <style:style style:name="P2" style:family="paragraph" style:parent-style-name="Standard">
      <style:paragraph-properties fo:line-height="115%"/>
      <style:text-properties style:font-name="Courier New" fo:font-size="12.0pt" fo:color="#cc0000"/>
    </style:style>
    <style:style style:name="P3" style:family="paragraph" style:parent-style-name="Standard">
      <style:paragraph-properties fo:margin-left="3.0000in" fo:text-indent="0.5000in" fo:line-height="115%"/>
      <style:text-properties style:font-name="Arial" fo:font-size="12.0pt" fo:color="#000000"/>
    </style:style>
    <style:style style:name="P4" style:family="paragraph" style:parent-style-name="Standard">
      <style:paragraph-properties fo:line-height="115%"/>
      <style:text-properties style:font-name="Courier New" fo:font-size="12.0pt" fo:color="#000000"/>
    </style:style>
    <style:style style:name="P5" style:family="paragraph" style:parent-style-name="Standard">
      <style:paragraph-properties fo:line-height="115%"/>
      <style:text-properties style:font-name="Arial" fo:font-size="12.0pt" fo:color="#cc0000"/>
    </style:style>
    <style:style style:name="P6" style:family="paragraph" style:parent-style-name="Standard">
      <style:paragraph-properties fo:line-height="115%"/>
      <style:text-properties style:font-name="Courier New" fo:font-size="11.0pt" fo:color="#cc0000" fo:background-color="#ffffff"/>
    </style:style>
    <style:style style:name="P7" style:family="paragraph" style:parent-style-name="Standard">
      <style:paragraph-properties fo:line-height="115%"/>
      <style:text-properties style:font-name="Courier New" fo:font-size="11.0pt" fo:color="#dcdcdc" fo:background-color="#191919"/>
    </style:style>
    <style:style style:name="P8" style:family="paragraph" style:parent-style-name="Standard">
      <style:paragraph-properties fo:line-height="115%"/>
      <style:text-properties style:font-name="Courier New" fo:font-size="12.0pt" fo:color="#ff0000"/>
    </style:style>
    <style:style style:name="P9" style:family="paragraph" style:parent-style-name="Standard">
      <style:paragraph-properties fo:line-height="115%"/>
      <style:text-properties style:font-name="Courier New" fo:font-size="11.0pt" fo:color="#cc0000"/>
    </style:style>
    <style:style style:name="P10" style:family="paragraph" style:parent-style-name="Standard">
      <style:paragraph-properties fo:line-height="115%"/>
      <style:text-properties style:font-name="Arial" fo:font-size="11.0pt" fo:color="#000000"/>
    </style:style>
    <style:style style:name="P11" style:family="paragraph" style:parent-style-name="Standard">
      <style:paragraph-properties fo:line-height="115%"/>
      <style:text-properties style:font-name="Courier New" fo:font-size="11.0pt" fo:color="#ff0000"/>
    </style:style>
    <style:style style:name="P12" style:family="paragraph" style:parent-style-name="Standard">
      <style:paragraph-properties fo:line-height="115%"/>
      <style:text-properties style:font-name="Arial" fo:font-size="12.0pt" fo:color="#1155cc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color="#ff0000"/>
    </style:style>
    <style:style style:name="T3" style:family="text">
      <style:text-properties style:font-name="Arial" fo:color="#000000"/>
    </style:style>
    <style:style style:name="T4" style:family="text">
      <style:text-properties style:font-name="Courier New" fo:font-weight="bold" fo:font-weight-asian="bold" fo:font-weight-complex="bold" fo:color="#cc0000"/>
    </style:style>
    <style:style style:name="T5" style:family="text">
      <style:text-properties style:font-name="Courier New" fo:font-weight="bold" fo:font-weight-asian="bold" fo:font-weight-complex="bold" fo:color="#ff0000"/>
    </style:style>
    <style:style style:name="T6" style:family="text">
      <style:text-properties fo:font-weight="bold" fo:font-weight-asian="bold" fo:font-weight-complex="bold" fo:color="#cc0000"/>
    </style:style>
    <style:style style:name="T7" style:family="text">
      <style:text-properties style:font-name="Arial"/>
    </style:style>
    <style:style style:name="T8" style:family="text">
      <style:text-properties style:font-name="Courier New" fo:font-weight="bold" fo:font-weight-asian="bold" fo:font-weight-complex="bold"/>
    </style:style>
    <style:style style:name="T9" style:family="text">
      <style:text-properties fo:color="#000000"/>
    </style:style>
    <style:style style:name="T10" style:family="text">
      <style:text-properties style:font-name="Verdana" fo:color="#f14e32"/>
    </style:style>
    <style:style style:name="T11" style:family="text">
      <style:text-properties style:font-name="Arial" fo:font-size="12.0pt" fo:font-size-asian="12.0pt" fo:font-size-complex="12.0pt" fo:color="#000000"/>
    </style:style>
    <style:style style:name="T12" style:family="text">
      <style:text-properties style:font-name="Courier New" fo:font-size="11.0pt" fo:font-size-asian="11.0pt" fo:font-size-complex="11.0pt" fo:font-weight="bold" fo:font-weight-asian="bold" fo:font-weight-complex="bold" fo:color="#cc0000" fo:background-color="#ffffff"/>
    </style:style>
    <style:style style:name="T13" style:family="text">
      <style:text-properties style:font-name="Verdana" fo:font-size="11.0pt" fo:font-size-asian="11.0pt" fo:font-size-complex="11.0pt" fo:color="#f14e32" fo:background-color="#ffffff"/>
    </style:style>
    <style:style style:name="T14" style:family="text">
      <style:text-properties style:font-name="Verdana" fo:font-size="11.0pt" fo:font-size-asian="11.0pt" fo:font-size-complex="11.0pt" fo:font-weight="bold" fo:font-weight-asian="bold" fo:font-weight-complex="bold" fo:color="#f14e32" fo:background-color="#ffffff"/>
    </style:style>
    <style:style style:name="T15" style:family="text">
      <style:text-properties style:font-name="Courier New" fo:font-weight="bold" fo:font-weight-asian="bold" fo:font-weight-complex="bold" fo:color="#cc0000" fo:background-color="#ffffff"/>
    </style:style>
    <style:style style:name="T16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- creating</text:span></text:p>
      <text:p text:style-name="P2"><text:span text:style-name="T1">$ git branch branchname</text:span><text:span text:style-name="T2"><text:tab/><text:tab/><text:s/><text:tab/></text:span><text:span text:style-name="T3">// create new branch</text:span></text:p>
      <text:p text:style-name="P1"><text:span text:style-name="T4">$ git checkout -b branchname<text:tab/></text:span><text:span text:style-name="T5"><text:tab/></text:span>// create and checkout new branch</text:p>
      <text:p text:style-name="P1"><text:span text:style-name="T4">$ git branch -a</text:span><text:span text:style-name="T5"><text:tab/><text:tab/><text:tab/><text:tab/></text:span>// show all branches (local and remotes)</text:p>
      <text:p text:style-name="P1"><text:span text:style-name="T4">$ git branch -r</text:span><text:span text:style-name="T5"><text:tab/><text:tab/><text:tab/><text:tab/></text:span>// show only remote branches </text:p>
      <text:p text:style-name="P1"><text:span text:style-name="T4">$ git branch -v</text:span><text:span text:style-name="T5"><text:tab/><text:tab/><text:tab/><text:tab/></text:span>// show branches and last commits </text:p>
      <text:p text:style-name="P3">- you can combine flags -rv, -a</text:p>
      <text:p text:style-name="P1">- <text:span text:style-name="T1">deleting</text:span></text:p>
      <text:p text:style-name="P4"><text:span text:style-name="T6">$ git branch -d branchname</text:span><text:span text:style-name="T2"><text:tab/><text:tab/></text:span><text:span text:style-name="T7">// delete a branch locally</text:span></text:p>
      <text:p text:style-name="P2"><text:span text:style-name="T1">$ git push origin :remotebranch</text:span><text:span text:style-name="T2"><text:tab/></text:span><text:span text:style-name="T3">// delete a remote branch</text:span></text:p>
      <text:p text:style-name="P3"/>
      <text:p text:style-name="P1"><text:span text:style-name="T1">- other</text:span></text:p>
      <text:p text:style-name="P4"><text:span text:style-name="T6">$ git checkout branchname</text:span><text:span text:style-name="T2"><text:tab/><text:tab/></text:span><text:span text:style-name="T7">// switch to another branch</text:span></text:p>
      <text:p text:style-name="P1"><text:span text:style-name="T4">$ git add filename</text:span><text:span text:style-name="T5"><text:tab/><text:tab/><text:tab/><text:tab/></text:span>// add new file to staging</text:p>
      <text:p text:style-name="P5"><text:span text:style-name="T8">$ git rm filename</text:span><text:span text:style-name="T5"><text:tab/><text:tab/><text:tab/><text:tab/></text:span><text:span text:style-name="T9">// first do </text:span>$ rm filename</text:p>
      <text:p text:style-name="P2"><text:span text:style-name="T1">$ git rm -f filename</text:span><text:span text:style-name="T2"><text:tab/><text:tab/><text:tab/></text:span><text:span text:style-name="T3">// force remove</text:span></text:p>
      <text:p text:style-name="P2"><text:span text:style-name="T1">$ git rm -cached filename</text:span><text:span text:style-name="T2"><text:tab/><text:tab/></text:span><text:span text:style-name="T3">// untrack the file</text:span></text:p>
      <text:p text:style-name="P2"><text:span text:style-name="T1">$ git mv myfile newfile</text:span><text:span text:style-name="T2"><text:tab/><text:tab/><text:tab/></text:span><text:span text:style-name="T3">// rename the file</text:span></text:p>
      <text:p text:style-name="P2"><text:span text:style-name="T1">$ git commit -m “message”</text:span><text:span text:style-name="T2"><text:tab/><text:tab/></text:span><text:span text:style-name="T3">// commit your changes</text:span></text:p>
      <text:p text:style-name="P1"><text:span text:style-name="T4">$ git commit -am “message”</text:span><text:span text:style-name="T5"><text:tab/><text:tab/></text:span>// commit and stage all changes</text:p>
      <text:p text:style-name="P1"><text:span text:style-name="T4">$ git status</text:span><text:span text:style-name="T5"><text:tab/><text:tab/><text:tab/><text:tab/><text:tab/></text:span>// check untracked files</text:p>
      <text:p text:style-name="P1"><text:span text:style-name="T4">$ git diff</text:span><text:span text:style-name="T5"><text:tab/><text:tab/><text:tab/><text:tab/><text:tab/></text:span>// list unstaged diff since last commit</text:p>
      <text:p text:style-name="P1"><text:span text:style-name="T4">$ git diff --staged</text:span><text:span text:style-name="T5"><text:tab/><text:tab/><text:tab/><text:tab/></text:span>// list staged diff since last commit</text:p>
      <text:p text:style-name="P4"><text:span text:style-name="T6">$ git diff --cached</text:span><text:span text:style-name="T2"><text:tab/><text:tab/><text:tab/><text:tab/></text:span><text:span text:style-name="T7">// the same as above</text:span></text:p>
      <text:p text:style-name="P1"><text:span text:style-name="T4">$ git log<text:tab/><text:tab/><text:tab/><text:tab/><text:tab/><text:tab/></text:span>// list of all changes/commits</text:p>
      <text:p text:style-name="P1"><text:span text:style-name="T4">$ git log<text:tab/>-p<text:tab/><text:tab/><text:tab/><text:tab/><text:tab/></text:span>// shows diff in each commit</text:p>
      <text:p text:style-name="P1"><text:span text:style-name="T4">$ git log<text:tab/>--stat<text:tab/><text:tab/><text:tab/><text:tab/></text:span>// see stats for each commit</text:p>
      <text:p text:style-name="P2"><text:span text:style-name="T1">$ git log --pretty=online<text:tab/><text:tab/></text:span><text:span text:style-name="T3">// options:</text:span><text:span text:style-name="T1">short,full,fuller</text:span></text:p>
      <text:p text:style-name="P6"><text:span text:style-name="T1">$ git log --pretty=format:"%h %s" --graph</text:span><text:span text:style-name="T10"><text:tab/></text:span><text:span text:style-name="T11">// nice print </text:span></text:p>
      <text:p text:style-name="P1"/>
      <text:p text:style-name="P1">Undoing things:</text:p>
      <text:p text:style-name="P1"/>
      <text:p text:style-name="P1"><text:span text:style-name="T12">$ git commit --amend</text:span><text:span text:style-name="T13"><text:tab/><text:tab/><text:tab/><text:tab/></text:span>// ‘append’ to the last commit</text:p>
      <text:p text:style-name="P1">- usage:</text:p>
      <text:p text:style-name="P6"><text:span text:style-name="T1">$ git commit -m 'initial commit'<text:line-break/>$ git add forgotten_file<text:line-break/>$ git commit --amend</text:span></text:p>
      <text:p text:style-name="P7"><text:span text:style-name="T1">git reset --soft HEAD~1</text:span></text:p>
      <text:p text:style-name="P1"/>
      <text:p text:style-name="P2"><text:span text:style-name="T1">$ git pull origin master</text:span><text:span text:style-name="T2"><text:tab/><text:tab/></text:span><text:span text:style-name="T3">// pull from origin</text:span></text:p>
      <text:p text:style-name="P2"><text:span text:style-name="T1">$ git push origin branchname<text:tab/></text:span><text:span text:style-name="T2"><text:tab/></text:span><text:span text:style-name="T3">// push branch to origin</text:span></text:p>
      <text:p text:style-name="P2"><text:span text:style-name="T1">$ git remote add origin https://github.com/user/repo.git<text:tab/></text:span></text:p>
      <text:p text:style-name="P1"><text:span text:style-name="T4">$ git push origin :branchname<text:tab/></text:span>// delete remote branch (at origin)</text:p>
      <text:p text:style-name="P4"><text:span text:style-name="T6">$ git remote rm destination</text:span><text:span text:style-name="T2"><text:tab/><text:tab/></text:span><text:span text:style-name="T7">// remove remote repo locally</text:span></text:p>
      <text:p text:style-name="P2"><text:span text:style-name="T1">$ git remote rename origin destination<text:tab/></text:span><text:span text:style-name="T3">// change remote name</text:span></text:p>
      <text:p text:style-name="P2"><text:span text:style-name="T1">$ git remote set-url origin git@github.roving.com:ES/spui.git</text:span></text:p>
      <text:p text:style-name="P8"/>
      <text:p text:style-name="P2"><text:span text:style-name="T1">$ git reset filename<text:tab/></text:span><text:span text:style-name="T2"><text:tab/><text:tab/></text:span><text:span text:style-name="T3">// unstage files</text:span></text:p>
      <text:p text:style-name="P2"><text:span text:style-name="T1">$ git checkout -- filename</text:span><text:span text:style-name="T2"><text:tab/><text:tab/></text:span><text:span text:style-name="T3">// get rid of filename</text:span></text:p>
      <text:p text:style-name="P8"/>
      <text:p text:style-name="P1"><text:span text:style-name="T4">$ git help</text:span><text:span text:style-name="T5"><text:tab/><text:tab/><text:tab/><text:tab/><text:tab/></text:span>// ask for help </text:p>
      <text:p text:style-name="P2"><text:span text:style-name="T1">$ git help [command]</text:span><text:span text:style-name="T2"><text:tab/></text:span></text:p>
      <text:p text:style-name="P2"><text:span text:style-name="T1">$ git [command] help</text:span><text:span text:style-name="T14"><text:line-break/></text:span><text:span text:style-name="T1">$ man git [command]</text:span><text:span text:style-name="T2"><text:tab/><text:tab/></text:span></text:p>
      <text:p text:style-name="P1"/>
      <text:p text:style-name="P1">- First time you configure git</text:p>
      <text:p text:style-name="P9"><text:span text:style-name="T1">$ git config --global user.name "Nevena Djaja"</text:span></text:p>
      <text:p text:style-name="P9"><text:span text:style-name="T1">$ git config --global user.email nevena.djaja@gmail.com</text:span></text:p>
      <text:p text:style-name="P9"><text:span text:style-name="T1">$ git config --global color.ui true</text:span></text:p>
      <text:p text:style-name="P9"/>
      <text:p text:style-name="P10">- check your settings</text:p>
      <text:p text:style-name="P9"><text:span text:style-name="T1">$ git config --list</text:span></text:p>
      <text:p text:style-name="P10"/>
      <text:p text:style-name="P10">- Clone from remote</text:p>
      <text:p text:style-name="P6"><text:span text:style-name="T1">$ git clone git://github.com/schacon/grit.git myfolder</text:span></text:p>
      <text:p text:style-name="P9"/>
      <text:p text:style-name="P10">- Clone from local</text:p>
      <text:p text:style-name="P6"><text:span text:style-name="T1">$ git clone mylocalrepo</text:span></text:p>
      <text:p text:style-name="P6"/>
      <text:p text:style-name="P10">- Clone only one branch</text:p>
      <text:p text:style-name="P6"><text:span text:style-name="T1">$ git clone -b mybranch --single-branch git://github.com/schacon/grit.git </text:span></text:p>
      <text:p text:style-name="P10"/>
      <text:p text:style-name="P10">- Pull only one branch from existing repo</text:p>
      <text:p text:style-name="P6"><text:span text:style-name="T1">$git checkout -b integration origin/integration</text:span></text:p>
      <text:p text:style-name="P10"><text:span text:style-name="T15">$git fetch --all <text:tab/></text:span>// will only update existing branches, won’t pull new ones</text:p>
      <text:p text:style-name="P10"/>
      <text:p text:style-name="P10">Cherry-pick specific commits and upload them</text:p>
      <text:p text:style-name="P10">- be on the branch you want to push your commits, e.g. integration </text:p>
      <text:p text:style-name="P10">- find a hash number of specific commit (long hash number) </text:p>
      <text:p text:style-name="P6"><text:span text:style-name="T1">$git cherry-pick &lt;commit_hash&gt;</text:span></text:p>
      <text:p text:style-name="P10"><text:span text:style-name="T15">$git push origin integration<text:tab/></text:span>// after choosing commits, upload to branch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Resources</text:span></text:p>
      <text:p text:style-name="P12"><text:a xlink:type="simple" xlink:href="http://git-scm.com/book/en/Git-Branching-Basic-Branching-and-Merging"><text:span text:style-name="T16">http://git-scm.com/book/en/Git-Branching-Basic-Branching-and-Merging</text:span></text:a></text:p>
      <text:p text:style-name="P12"><text:a xlink:type="simple" xlink:href="https://wiki.roving.com/display/EngOps/Git+at+CTCT"><text:span text:style-name="T16">https://wiki.roving.com/display/EngOps/Git+at+CTCT</text:span></text:a></text:p>
      <text:p text:style-name="P12"><text:a xlink:type="simple" xlink:href="http://git-scm.com/book"><text:span text:style-name="T16">http://git-scm.com/book</text:span></text:a></text:p>
      <text:p text:style-name="P12"><text:a xlink:type="simple" xlink:href="http://git-scm.com/book/en/Git-Branching-Rebasing"><text:span text:style-name="T16">http://git-scm.com/book/en/Git-Branching-Rebasing</text:span></text:a></text:p>
      <text:p text:style-name="P12"><text:a xlink:type="simple" xlink:href="http://zachholman.com/talk/more-git-and-github-secrets/?utm_source=buffer&amp;utm_campaign=Buffer&amp;utm_content=buffer24484&amp;utm_medium=facebook"><text:span text:style-name="T16">http://zachholman.com/talk/more-git-and-github-secrets/?utm_source=buffer&amp;utm_campaign=Buffer&amp;utm_content=buffer24484&amp;utm_medium=facebook</text:span></text:a></text:p>
      <text:p text:style-name="P1"/>
      <text:p text:style-name="P1"/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19</meta:generator>
  </office:meta>
</office:document-meta>
</file>